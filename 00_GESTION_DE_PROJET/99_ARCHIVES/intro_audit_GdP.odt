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text-properties fo:font-weight="bold" style:font-weight-asian="bold" style:font-weight-complex="bold" fo:font-size="18pt" style:font-size-asian="18pt" style:font-size-complex="18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Paragraphedeliste" style:list-style-name="LFO2" style:family="paragraph"/>
    <style:style style:name="P6" style:parent-style-name="Paragraphedeliste" style:list-style-name="LFO2" style:family="paragraph"/>
    <style:style style:name="P7" style:parent-style-name="Paragraphedeliste" style:list-style-name="LFO3" style:family="paragraph"/>
    <style:style style:name="T8" style:parent-style-name="Policepardéfaut" style:family="text">
      <style:text-properties fo:font-weight="bold" style:font-weight-asian="bold" style:font-weight-complex="bold"/>
    </style:style>
    <style:style style:name="P9" style:parent-style-name="Paragraphedeliste" style:list-style-name="LFO3" style:family="paragraph"/>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P12" style:parent-style-name="Paragraphedeliste" style:list-style-name="LFO3" style:family="paragraph"/>
    <style:style style:name="T13" style:parent-style-name="Policepardéfaut" style:family="text">
      <style:text-properties fo:font-weight="bold" style:font-weight-asian="bold" style:font-weight-complex="bold"/>
    </style:style>
    <style:style style:name="P14" style:parent-style-name="Paragraphedeliste" style:list-style-name="LFO3" style:family="paragraph"/>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Paragraphedeliste" style:list-style-name="LFO4" style:family="paragraph"/>
    <style:style style:name="P22" style:parent-style-name="Paragraphedeliste" style:list-style-name="LFO4" style:family="paragraph"/>
    <style:style style:name="P23" style:parent-style-name="Paragraphedeliste" style:list-style-name="LFO4" style:family="paragraph"/>
    <style:style style:name="P24" style:parent-style-name="Normal" style:family="paragraph">
      <style:text-properties fo:font-size="14pt" style:font-size-asian="14pt" style:font-size-complex="14pt"/>
    </style:style>
    <style:style style:name="P25" style:parent-style-name="Normal" style:family="paragraph">
      <style:paragraph-properties fo:margin-left="0.25in">
        <style:tab-stops/>
      </style:paragraph-properties>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Intro audit GdP</text:p>
      <text:p text:style-name="P2"/>
      <text:p text:style-name="P3">Présentation projet :<text:s/></text:p>
      <text:p text:style-name="Normal"/>
      <text:p text:style-name="P4">Présentation client<text:s/>(Pour qui) : F-2049</text:p>
      <text:list text:style-name="LFO2" text:continue-numbering="true">
        <text:list-item>
          <text:p text:style-name="P5"><draw:frame draw:z-index="251658240" draw:style-name="a0" draw:name="Image 1" text:anchor-type="paragraph" svg:x="0.00208in" svg:y="-0.00278in" svg:width="1.40278in" svg:height="1.40278in" style:rel-width="scale" style:rel-height="scale"><draw:image xlink:href="media/image1.png" xlink:type="simple" xlink:show="embed" xlink:actuate="onLoad"/><svg:title/><svg:desc>F-2049 | Réindustrialisation</svg:desc></draw:frame>Activité principale :<text:s/>Conseil et assistance aux entreprises dans<text:s/><text:s text:c="5"/>leur conception et mise en place de plans stratégiques.</text:p>
        </text:list-item>
        <text:list-item>
          <text:p text:style-name="P6">F-2049 est un cabinet de conseil dédié à la réindustrialisation, aux relocalisations, à la reconstitution de filières affaiblies.<text:s/>Leur objectif<text:s/>est d’aider<text:s/>les acteurs privés, pouvoirs publics, collectivités territoriales, associations et fédérations professionnelles à surmonter les défis de la mondialisation et à renforcer la compétitivité des entreprises françaises sur le marché local et européen.<text:s/></text:p>
        </text:list-item>
      </text:list>
      <text:p text:style-name="Normal">Leurs missions :<text:s/></text:p>
      <text:list text:style-name="LFO3" text:continue-numbering="true">
        <text:list-item>
          <text:p text:style-name="P7"><text:span text:style-name="T8">Consolider les chaînes de valeur :</text:span><text:s/>Face aux défis de la mondialisation – coûts élevés, dépendance aux fournisseurs étrangers, impact environnemental – apporter notre expertise pour sécuriser les chaînes de valeur et garantir une compétitivité durable. Créer la rencontre entre différents maillons de la chaine de valeur : des fournisseurs aux distributeurs en passant par les fabricants.<text:s/></text:p>
        </text:list-item>
        <text:list-item>
          <text:p text:style-name="P9"><text:span text:style-name="T10">Déployer les bonnes pratiques du conseil en stratégie</text:span><text:span text:style-name="T11"> :<text:s/></text:span>Permettre aux acteurs de la réindustrialisation de se doter d'une stratégie claire, déclinée en une feuille de route aux objectifs atteignables à partir d'une analyse de marché complète. </text:p>
        </text:list-item>
        <text:list-item>
          <text:p text:style-name="P12"><text:span text:style-name="T13">Démocratiser le meilleur de la R&amp;D :</text:span><text:s/>Travailler en partenariat avec les grandes écoles et les universités pour innover sur les usages et apporter le meilleur de l'innovation aux entreprises.</text:p>
        </text:list-item>
        <text:list-item>
          <text:p text:style-name="P14"><text:span text:style-name="T15">Création d’écosystèmes</text:span><text:span text:style-name="T16"> :<text:s/></text:span>Identifier les acteurs clés et faciliter les partenariats stratégiques pour créer des réseaux dynamiques. Grâce à des projets collaboratifs, favoriser l'innovation ouverte et le développement technologique.</text:p>
        </text:list-item>
      </text:list>
      <text:p text:style-name="Normal">Leur méthodologie :<text:s/><text:span text:style-name="T17">R</text:span>éindustrialisation =Smart<text:s/><text:span text:style-name="T18">D</text:span>ata<text:s/><text:span text:style-name="T19">S</text:span>tratégie<text:s/><text:span text:style-name="T20">C</text:span>ollaboration</text:p>
      <text:list text:style-name="LFO4" text:continue-numbering="true">
        <text:list-item>
          <text:p text:style-name="P21">Grâce à l'utilisation de l'intelligence artificielle et du big data, nous analysons des bases de<text:s/>données d'entreprises, de douanes, de produits, et bien plus encore. Cette analyse détaillée nous<text:s/>permet d'avoir une vision précise de l'état des filières industrielles, en identifiant les forces et les<text:s/>faiblesses ainsi que les acteurs qui les composent. Une utilisation intensive de la big data est cruciale<text:s/>pour comprendre d'où l'on vient et établir une base solide pour toute stratégie.</text:p>
        </text:list-item>
        <text:list-item>
          <text:p text:style-name="P22">Notre approche stratégique détermine où aller, pourquoi y aller et comment y aller. La stratégie repose sur une analyse approfondie des données pour définir les objectifs et les actions nécessaires. Qu'il s'agisse de stratégie territoriale — "Entrante" (compétences et/ou activités à attirer) ou "Sortante" (compétences et/ou activités à développer ailleurs) — ou de stratégie d'entreprise visant la diversification, une stratégie bien pensée guide les entreprises vers le succès.</text:p>
        </text:list-item>
        <text:list-item>
          <text:p text:style-name="P23">La collaboration est essentielle pour exécuter la stratégie. Face à l'affaiblissement des filières, il est nécessaire de mobiliser intensivement toutes les ressources possibles. Cela inclut la recherche de partenaires industriels, commerciaux et académiques, l'utilisation de la méthode ITACC 5.0 pour analyser les projets, et l'intégration de notre accélérateur de réindustrialisation. Cette mobilisation collective assure que la stratégie est mise en œuvre efficacement et que les objectifs sont atteints.</text:p>
        </text:list-item>
      </text:list>
      <text:p text:style-name="P24">Pourquoi :</text:p>
      <text:p text:style-name="Normal"/>
      <text:p text:style-name="P2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wixui-rich-text__text" style:display-name="wixui-rich-text__text" style:family="text" style:parent-style-name="Policepardéfaut"/>
    <style:style style:name="font_8" style:display-name="font_8"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sco Barnaud</meta:initial-creator>
    <dc:creator>Cisco Barnaud</dc:creator>
    <meta:creation-date>2026-01-10T09:27:00Z</meta:creation-date>
    <dc:date>2026-01-10T10:27:00Z</dc:date>
    <meta:template xlink:href="Normal" xlink:type="simple"/>
    <meta:editing-cycles>2</meta:editing-cycles>
    <meta:editing-duration>PT3600S</meta:editing-duration>
    <meta:document-statistic meta:page-count="2" meta:paragraph-count="6" meta:word-count="500" meta:character-count="3246" meta:row-count="22" meta:non-whitespace-character-count="2752"/>
  </office:meta>
</office:document-meta>
</file>